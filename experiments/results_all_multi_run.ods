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6335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5366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6866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5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 style:data-style-name="N129">
      <style:table-cell-properties fo:border="0.74pt solid #000000"/>
    </style:style>
    <style:style style:name="ce5" style:family="table-cell" style:parent-style-name="Default" style:data-style-name="N131">
      <style:table-cell-properties fo:border="0.74pt solid #000000"/>
    </style:style>
    <style:style style:name="ce6" style:family="table-cell" style:parent-style-name="Default" style:data-style-name="N100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all_multi_run" table:style-name="ta1">
        <table:shapes>
          <draw:frame draw:z-index="0" draw:style-name="gr1" draw:text-style-name="P1" svg:width="6.5276in" svg:height="3.0465in" svg:x="0.0744in" svg:y="5.5839in">
            <draw:object draw:notify-on-update-of-ranges="results_all_multi_run.A22:results_all_multi_run.A22 results_all_multi_run.A23:results_all_multi_run.A27 results_all_multi_run.B22:results_all_multi_run.B22 results_all_multi_run.B23:results_all_multi_run.B27 results_all_multi_run.C22:results_all_multi_run.C22 results_all_multi_run.C23:results_all_multi_run.C27 results_all_multi_run.D22:results_all_multi_run.D22 results_all_multi_run.D23:results_all_multi_run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6433in" svg:height="3.1594in" svg:x="6.826in" svg:y="5.5598in">
            <draw:object draw:notify-on-update-of-ranges="results_all_multi_run.F22:results_all_multi_run.F22 results_all_multi_run.F23:results_all_multi_run.F27 results_all_multi_run.G22:results_all_multi_run.G22 results_all_multi_run.G23:results_all_multi_run.G27 results_all_multi_run.H22:results_all_multi_run.H22 results_all_multi_run.H23:results_all_multi_run.H27 results_all_multi_run.I22:results_all_multi_run.I22 results_all_multi_run.I23:results_all_multi_run.I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9972in" svg:height="3.1193in" svg:x="13.8008in" svg:y="5.5594in">
            <draw:object draw:notify-on-update-of-ranges="results_all_multi_run.K22:results_all_multi_run.K22 results_all_multi_run.K23:results_all_multi_run.K27 results_all_multi_run.L22:results_all_multi_run.L22 results_all_multi_run.L23:results_all_multi_run.L27 results_all_multi_run.M22:results_all_multi_run.M22 results_all_multi_run.M23:results_all_multi_run.M27 results_all_multi_run.N22:results_all_multi_run.N22 results_all_multi_run.N23:results_all_multi_run.N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5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6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original_size_bytes</text:p>
          </table:table-cell>
          <table:table-cell table:style-name="ce1" office:value-type="string" calcext:value-type="string">
            <text:p>original_size_kb</text:p>
          </table:table-cell>
          <table:table-cell table:style-name="ce1" office:value-type="string" calcext:value-type="string">
            <text:p>compressed_size_bytes</text:p>
          </table:table-cell>
          <table:table-cell table:style-name="ce1" office:value-type="string" calcext:value-type="string">
            <text:p>restored_size_bytes</text:p>
          </table:table-cell>
          <table:table-cell table:style-name="ce1" office:value-type="string" calcext:value-type="string">
            <text:p>compression_ratio</text:p>
          </table:table-cell>
          <table:table-cell table:style-name="ce1" office:value-type="string" calcext:value-type="string">
            <text:p>compress_mean_sec</text:p>
          </table:table-cell>
          <table:table-cell table:style-name="ce1" office:value-type="string" calcext:value-type="string">
            <text:p>compress_std_sec</text:p>
          </table:table-cell>
          <table:table-cell table:style-name="ce1" office:value-type="string" calcext:value-type="string">
            <text:p>compress_std_percent</text:p>
          </table:table-cell>
          <table:table-cell table:style-name="ce1" office:value-type="string" calcext:value-type="string">
            <text:p>decompress_mean_sec</text:p>
          </table:table-cell>
          <table:table-cell table:style-name="ce1" office:value-type="string" calcext:value-type="string">
            <text:p>decompress_std_sec</text:p>
          </table:table-cell>
          <table:table-cell table:style-name="ce1" office:value-type="string" calcext:value-type="string">
            <text:p>decompress_std_percent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50kb.txt</text:p>
          </table:table-cell>
          <table:table-cell office:value-type="float" office:value="51200" calcext:value-type="float">
            <text:p>51200</text:p>
          </table:table-cell>
          <table:table-cell office:value-type="float" office:value="50" calcext:value-type="float">
            <text:p>50</text:p>
          </table:table-cell>
          <table:table-cell office:value-type="float" office:value="25486" calcext:value-type="float">
            <text:p>25486</text:p>
          </table:table-cell>
          <table:table-cell office:value-type="float" office:value="51200" calcext:value-type="float">
            <text:p>51200</text:p>
          </table:table-cell>
          <table:table-cell office:value-type="float" office:value="0.497773" calcext:value-type="float">
            <text:p>0.498</text:p>
          </table:table-cell>
          <table:table-cell office:value-type="float" office:value="0.016604" calcext:value-type="float">
            <text:p>0.01660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1.15" calcext:value-type="float">
            <text:p>1.15</text:p>
          </table:table-cell>
          <table:table-cell office:value-type="float" office:value="0.005236" calcext:value-type="float">
            <text:p>0.0052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5.64" calcext:value-type="float">
            <text:p>5.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100kb.txt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" calcext:value-type="float">
            <text:p>100</text:p>
          </table:table-cell>
          <table:table-cell office:value-type="float" office:value="51943" calcext:value-type="float">
            <text:p>51943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507256" calcext:value-type="float">
            <text:p>0.507</text:p>
          </table:table-cell>
          <table:table-cell office:value-type="float" office:value="0.030718" calcext:value-type="float">
            <text:p>0.03072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1.05" calcext:value-type="float">
            <text:p>1.05</text:p>
          </table:table-cell>
          <table:table-cell office:value-type="float" office:value="0.009361" calcext:value-type="float">
            <text:p>0.00936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250kb.txt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0" calcext:value-type="float">
            <text:p>250</text:p>
          </table:table-cell>
          <table:table-cell office:value-type="float" office:value="133628" calcext:value-type="float">
            <text:p>133628</text:p>
          </table:table-cell>
          <table:table-cell office:value-type="float" office:value="256000" calcext:value-type="float">
            <text:p>256000</text:p>
          </table:table-cell>
          <table:table-cell office:value-type="float" office:value="0.521984" calcext:value-type="float">
            <text:p>0.522</text:p>
          </table:table-cell>
          <table:table-cell office:value-type="float" office:value="0.075911" calcext:value-type="float">
            <text:p>0.07591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64" calcext:value-type="float">
            <text:p>0.64</text:p>
          </table:table-cell>
          <table:table-cell office:value-type="float" office:value="0.021482" calcext:value-type="float">
            <text:p>0.0214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86" calcext:value-type="float">
            <text:p>1.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500kb.txt</text:p>
          </table:table-cell>
          <table:table-cell office:value-type="float" office:value="512000" calcext:value-type="float">
            <text:p>512000</text:p>
          </table:table-cell>
          <table:table-cell office:value-type="float" office:value="500" calcext:value-type="float">
            <text:p>500</text:p>
          </table:table-cell>
          <table:table-cell office:value-type="float" office:value="272119" calcext:value-type="float">
            <text:p>272119</text:p>
          </table:table-cell>
          <table:table-cell office:value-type="float" office:value="512000" calcext:value-type="float">
            <text:p>512000</text:p>
          </table:table-cell>
          <table:table-cell office:value-type="float" office:value="0.531482" calcext:value-type="float">
            <text:p>0.531</text:p>
          </table:table-cell>
          <table:table-cell office:value-type="float" office:value="0.150316" calcext:value-type="float">
            <text:p>0.15032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1.11" calcext:value-type="float">
            <text:p>1.11</text:p>
          </table:table-cell>
          <table:table-cell office:value-type="float" office:value="0.044177" calcext:value-type="float">
            <text:p>0.04418</text:p>
          </table:table-cell>
          <table:table-cell office:value-type="float" office:value="0.009637" calcext:value-type="float">
            <text:p>0.009637</text:p>
          </table:table-cell>
          <table:table-cell office:value-type="float" office:value="21.82" calcext:value-type="float">
            <text:p>21.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1000kb.txt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258" calcext:value-type="float">
            <text:p>536258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523689" calcext:value-type="float">
            <text:p>0.524</text:p>
          </table:table-cell>
          <table:table-cell office:value-type="float" office:value="0.293634" calcext:value-type="float">
            <text:p>0.29363</text:p>
          </table:table-cell>
          <table:table-cell office:value-type="float" office:value="0.002718" calcext:value-type="float">
            <text:p>0.002718</text:p>
          </table:table-cell>
          <table:table-cell office:value-type="float" office:value="0.93" calcext:value-type="float">
            <text:p>0.93</text:p>
          </table:table-cell>
          <table:table-cell office:value-type="float" office:value="0.081662" calcext:value-type="float">
            <text:p>0.08166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2.38" calcext:value-type="float">
            <text:p>2.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war_and_peace_2800kb.txt</text:p>
          </table:table-cell>
          <table:table-cell office:value-type="float" office:value="2811213" calcext:value-type="float">
            <text:p>2811213</text:p>
          </table:table-cell>
          <table:table-cell office:value-type="float" office:value="2745.3" calcext:value-type="float">
            <text:p>2745.3</text:p>
          </table:table-cell>
          <table:table-cell office:value-type="float" office:value="1447504" calcext:value-type="float">
            <text:p>1447504</text:p>
          </table:table-cell>
          <table:table-cell office:value-type="float" office:value="2811213" calcext:value-type="float">
            <text:p>2811213</text:p>
          </table:table-cell>
          <table:table-cell office:value-type="float" office:value="0.514904" calcext:value-type="float">
            <text:p>0.515</text:p>
          </table:table-cell>
          <table:table-cell office:value-type="float" office:value="0.794233" calcext:value-type="float">
            <text:p>0.79423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0.86" calcext:value-type="float">
            <text:p>0.86</text:p>
          </table:table-cell>
          <table:table-cell office:value-type="float" office:value="0.215888" calcext:value-type="float">
            <text:p>0.21589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1.79" calcext:value-type="float">
            <text:p>1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50kb.txt</text:p>
          </table:table-cell>
          <table:table-cell office:value-type="float" office:value="51200" calcext:value-type="float">
            <text:p>51200</text:p>
          </table:table-cell>
          <table:table-cell office:value-type="float" office:value="50" calcext:value-type="float">
            <text:p>50</text:p>
          </table:table-cell>
          <table:table-cell office:value-type="float" office:value="26859" calcext:value-type="float">
            <text:p>26859</text:p>
          </table:table-cell>
          <table:table-cell office:value-type="float" office:value="51200" calcext:value-type="float">
            <text:p>51200</text:p>
          </table:table-cell>
          <table:table-cell office:value-type="float" office:value="0.52459" calcext:value-type="float">
            <text:p>0.525</text:p>
          </table:table-cell>
          <table:table-cell office:value-type="float" office:value="0.015769" calcext:value-type="float">
            <text:p>0.0157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68" calcext:value-type="float">
            <text:p>0.68</text:p>
          </table:table-cell>
          <table:table-cell office:value-type="float" office:value="0.005213" calcext:value-type="float">
            <text:p>0.0052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4.51" calcext:value-type="float">
            <text:p>4.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100kb.txt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" calcext:value-type="float">
            <text:p>100</text:p>
          </table:table-cell>
          <table:table-cell office:value-type="float" office:value="55228" calcext:value-type="float">
            <text:p>55228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539336" calcext:value-type="float">
            <text:p>0.539</text:p>
          </table:table-cell>
          <table:table-cell office:value-type="float" office:value="0.030491" calcext:value-type="float">
            <text:p>0.03049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1.03" calcext:value-type="float">
            <text:p>1.03</text:p>
          </table:table-cell>
          <table:table-cell office:value-type="float" office:value="0.009138" calcext:value-type="float">
            <text:p>0.00914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3.17" calcext:value-type="float">
            <text:p>3.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250kb.txt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0" calcext:value-type="float">
            <text:p>250</text:p>
          </table:table-cell>
          <table:table-cell office:value-type="float" office:value="157269" calcext:value-type="float">
            <text:p>157269</text:p>
          </table:table-cell>
          <table:table-cell office:value-type="float" office:value="256000" calcext:value-type="float">
            <text:p>256000</text:p>
          </table:table-cell>
          <table:table-cell office:value-type="float" office:value="0.614332" calcext:value-type="float">
            <text:p>0.614</text:p>
          </table:table-cell>
          <table:table-cell office:value-type="float" office:value="0.075966" calcext:value-type="float">
            <text:p>0.07597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77" calcext:value-type="float">
            <text:p>0.77</text:p>
          </table:table-cell>
          <table:table-cell office:value-type="float" office:value="0.02339" calcext:value-type="float">
            <text:p>0.02339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4.01" calcext:value-type="float">
            <text:p>4.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500kb.txt</text:p>
          </table:table-cell>
          <table:table-cell office:value-type="float" office:value="512000" calcext:value-type="float">
            <text:p>512000</text:p>
          </table:table-cell>
          <table:table-cell office:value-type="float" office:value="500" calcext:value-type="float">
            <text:p>500</text:p>
          </table:table-cell>
          <table:table-cell office:value-type="float" office:value="312424" calcext:value-type="float">
            <text:p>312424</text:p>
          </table:table-cell>
          <table:table-cell office:value-type="float" office:value="512000" calcext:value-type="float">
            <text:p>512000</text:p>
          </table:table-cell>
          <table:table-cell office:value-type="float" office:value="0.610203" calcext:value-type="float">
            <text:p>0.610</text:p>
          </table:table-cell>
          <table:table-cell office:value-type="float" office:value="0.151391" calcext:value-type="float">
            <text:p>0.1513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5.03" calcext:value-type="float">
            <text:p>5.03</text:p>
          </table:table-cell>
          <table:table-cell office:value-type="float" office:value="0.045057" calcext:value-type="float">
            <text:p>0.04506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2.38" calcext:value-type="float">
            <text:p>2.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_1000kb.txt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00" calcext:value-type="float">
            <text:p>1000</text:p>
          </table:table-cell>
          <table:table-cell office:value-type="float" office:value="650974" calcext:value-type="float">
            <text:p>650974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635717" calcext:value-type="float">
            <text:p>0.636</text:p>
          </table:table-cell>
          <table:table-cell office:value-type="float" office:value="0.303047" calcext:value-type="float">
            <text:p>0.30305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81" calcext:value-type="float">
            <text:p>0.81</text:p>
          </table:table-cell>
          <table:table-cell office:value-type="float" office:value="0.091996" calcext:value-type="float">
            <text:p>0.09200</text:p>
          </table:table-cell>
          <table:table-cell office:value-type="float" office:value="0.002232" calcext:value-type="float">
            <text:p>0.002232</text:p>
          </table:table-cell>
          <table:table-cell office:value-type="float" office:value="2.43" calcext:value-type="float">
            <text:p>2.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50kb.jpg</text:p>
          </table:table-cell>
          <table:table-cell office:value-type="float" office:value="51200" calcext:value-type="float">
            <text:p>51200</text:p>
          </table:table-cell>
          <table:table-cell office:value-type="float" office:value="50" calcext:value-type="float">
            <text:p>50</text:p>
          </table:table-cell>
          <table:table-cell office:value-type="float" office:value="49928" calcext:value-type="float">
            <text:p>49928</text:p>
          </table:table-cell>
          <table:table-cell office:value-type="float" office:value="51200" calcext:value-type="float">
            <text:p>51200</text:p>
          </table:table-cell>
          <table:table-cell office:value-type="float" office:value="0.975156" calcext:value-type="float">
            <text:p>0.975</text:p>
          </table:table-cell>
          <table:table-cell office:value-type="float" office:value="0.022137" calcext:value-type="float">
            <text:p>0.02214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1.38" calcext:value-type="float">
            <text:p>1.38</text:p>
          </table:table-cell>
          <table:table-cell office:value-type="float" office:value="0.010366" calcext:value-type="float">
            <text:p>0.01037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3.05" calcext:value-type="float">
            <text:p>3.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100kb.jpg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" calcext:value-type="float">
            <text:p>100</text:p>
          </table:table-cell>
          <table:table-cell office:value-type="float" office:value="98515" calcext:value-type="float">
            <text:p>98515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62061" calcext:value-type="float">
            <text:p>0.962</text:p>
          </table:table-cell>
          <table:table-cell office:value-type="float" office:value="0.042021" calcext:value-type="float">
            <text:p>0.04202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65" calcext:value-type="float">
            <text:p>0.65</text:p>
          </table:table-cell>
          <table:table-cell office:value-type="float" office:value="0.018615" calcext:value-type="float">
            <text:p>0.01862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2.27" calcext:value-type="float">
            <text:p>2.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250kb.jpg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0" calcext:value-type="float">
            <text:p>250</text:p>
          </table:table-cell>
          <table:table-cell office:value-type="float" office:value="244210" calcext:value-type="float">
            <text:p>244210</text:p>
          </table:table-cell>
          <table:table-cell office:value-type="float" office:value="256000" calcext:value-type="float">
            <text:p>256000</text:p>
          </table:table-cell>
          <table:table-cell office:value-type="float" office:value="0.953945" calcext:value-type="float">
            <text:p>0.954</text:p>
          </table:table-cell>
          <table:table-cell office:value-type="float" office:value="0.101663" calcext:value-type="float">
            <text:p>0.10166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0.8" calcext:value-type="float">
            <text:p>0.8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2.14" calcext:value-type="float">
            <text:p>2.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500kb.jpg</text:p>
          </table:table-cell>
          <table:table-cell office:value-type="float" office:value="512000" calcext:value-type="float">
            <text:p>512000</text:p>
          </table:table-cell>
          <table:table-cell office:value-type="float" office:value="500" calcext:value-type="float">
            <text:p>500</text:p>
          </table:table-cell>
          <table:table-cell office:value-type="float" office:value="488021" calcext:value-type="float">
            <text:p>488021</text:p>
          </table:table-cell>
          <table:table-cell office:value-type="float" office:value="512000" calcext:value-type="float">
            <text:p>512000</text:p>
          </table:table-cell>
          <table:table-cell office:value-type="float" office:value="0.953166" calcext:value-type="float">
            <text:p>0.953</text:p>
          </table:table-cell>
          <table:table-cell office:value-type="float" office:value="0.201087" calcext:value-type="float">
            <text:p>0.20109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.88" calcext:value-type="float">
            <text:p>0.88</text:p>
          </table:table-cell>
          <table:table-cell office:value-type="float" office:value="0.085698" calcext:value-type="float">
            <text:p>0.08570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1.32" calcext:value-type="float">
            <text:p>1.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1000kb.jpg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00" calcext:value-type="float">
            <text:p>1000</text:p>
          </table:table-cell>
          <table:table-cell office:value-type="float" office:value="979007" calcext:value-type="float">
            <text:p>979007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956062" calcext:value-type="float">
            <text:p>0.956</text:p>
          </table:table-cell>
          <table:table-cell office:value-type="float" office:value="0.399391" calcext:value-type="float">
            <text:p>0.39939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7" calcext:value-type="float">
            <text:p>0.7</text:p>
          </table:table-cell>
          <table:table-cell office:value-type="float" office:value="0.17097" calcext:value-type="float">
            <text:p>0.17097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1.46" calcext:value-type="float">
            <text:p>1.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2500kb.jpg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2500" calcext:value-type="float">
            <text:p>2500</text:p>
          </table:table-cell>
          <table:table-cell office:value-type="float" office:value="2464818" calcext:value-type="float">
            <text:p>2464818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0.96282" calcext:value-type="float">
            <text:p>0.963</text:p>
          </table:table-cell>
          <table:table-cell office:value-type="float" office:value="1.005225" calcext:value-type="float">
            <text:p>1.00523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0.79" calcext:value-type="float">
            <text:p>0.79</text:p>
          </table:table-cell>
          <table:table-cell office:value-type="float" office:value="0.432342" calcext:value-type="float">
            <text:p>0.43234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1.82" calcext:value-type="float">
            <text:p>1.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image_5000kb.jpg</text:p>
          </table:table-cell>
          <table:table-cell office:value-type="float" office:value="4799714" calcext:value-type="float">
            <text:p>4799714</text:p>
          </table:table-cell>
          <table:table-cell office:value-type="float" office:value="4687.2" calcext:value-type="float">
            <text:p>4687.2</text:p>
          </table:table-cell>
          <table:table-cell office:value-type="float" office:value="4621526" calcext:value-type="float">
            <text:p>4621526</text:p>
          </table:table-cell>
          <table:table-cell office:value-type="float" office:value="4799714" calcext:value-type="float">
            <text:p>4799714</text:p>
          </table:table-cell>
          <table:table-cell office:value-type="float" office:value="0.962875" calcext:value-type="float">
            <text:p>0.963</text:p>
          </table:table-cell>
          <table:table-cell office:value-type="float" office:value="1.928529" calcext:value-type="float">
            <text:p>1.92853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9.89" calcext:value-type="float">
            <text:p>9.89</text:p>
          </table:table-cell>
          <table:table-cell office:value-type="float" office:value="0.801711" calcext:value-type="float">
            <text:p>0.80171</text:p>
          </table:table-cell>
          <table:table-cell office:value-type="float" office:value="0.011264" calcext:value-type="float">
            <text:p>0.011264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2">
          <table:table-cell table:style-name="Default" table:number-columns-repeated="15"/>
        </table:table-row>
        <table:table-row table:style-name="ro1">
          <table:table-cell table:style-name="ce3" office:value-type="string" calcext:value-type="string">
            <text:p>size_kb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mpressed</text:p>
          </table:table-cell>
          <table:table-cell table:style-name="Default"/>
          <table:table-cell table:style-name="ce3" office:value-type="string" calcext:value-type="string">
            <text:p>size_kb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mpressed</text:p>
          </table:table-cell>
          <table:table-cell table:style-name="Default"/>
          <table:table-cell table:style-name="ce3" office:value-type="string" calcext:value-type="string">
            <text:p>size_kb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mpressed</text:p>
          </table:table-cell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497773" calcext:value-type="float">
            <text:p>0.498</text:p>
          </table:table-cell>
          <table:table-cell table:style-name="ce4" office:value-type="float" office:value="0.52459" calcext:value-type="float">
            <text:p>0.525</text:p>
          </table:table-cell>
          <table:table-cell table:style-name="ce4" office:value-type="float" office:value="0.975156" calcext:value-type="float">
            <text:p>0.97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style-name="ce5" office:value-type="float" office:value="0.016604" calcext:value-type="float">
            <text:p>0.01660</text:p>
          </table:table-cell>
          <table:table-cell office:value-type="float" office:value="0.015769" calcext:value-type="float">
            <text:p>0.01577</text:p>
          </table:table-cell>
          <table:table-cell table:style-name="ce5" office:value-type="float" office:value="0.022137" calcext:value-type="float">
            <text:p>0.02214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005236" calcext:value-type="float">
            <text:p>0.00524</text:p>
          </table:table-cell>
          <table:table-cell table:style-name="ce5" office:value-type="float" office:value="0.005213" calcext:value-type="float">
            <text:p>0.00521</text:p>
          </table:table-cell>
          <table:table-cell table:style-name="ce5" office:value-type="float" office:value="0.010366" calcext:value-type="float">
            <text:p>0.01037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507256" calcext:value-type="float">
            <text:p>0.507</text:p>
          </table:table-cell>
          <table:table-cell table:style-name="ce4" office:value-type="float" office:value="0.539336" calcext:value-type="float">
            <text:p>0.539</text:p>
          </table:table-cell>
          <table:table-cell table:style-name="ce4" office:value-type="float" office:value="0.962061" calcext:value-type="float">
            <text:p>0.962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ce5" office:value-type="float" office:value="0.030718" calcext:value-type="float">
            <text:p>0.03072</text:p>
          </table:table-cell>
          <table:table-cell office:value-type="float" office:value="0.030491" calcext:value-type="float">
            <text:p>0.03049</text:p>
          </table:table-cell>
          <table:table-cell table:style-name="ce5" office:value-type="float" office:value="0.042021" calcext:value-type="float">
            <text:p>0.04202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0.009361" calcext:value-type="float">
            <text:p>0.00936</text:p>
          </table:table-cell>
          <table:table-cell table:style-name="ce5" office:value-type="float" office:value="0.009138" calcext:value-type="float">
            <text:p>0.00914</text:p>
          </table:table-cell>
          <table:table-cell table:style-name="ce5" office:value-type="float" office:value="0.018615" calcext:value-type="float">
            <text:p>0.01862</text:p>
          </table:table-cell>
          <table:table-cell table:style-name="Default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0.521984" calcext:value-type="float">
            <text:p>0.522</text:p>
          </table:table-cell>
          <table:table-cell table:style-name="ce4" office:value-type="float" office:value="0.614332" calcext:value-type="float">
            <text:p>0.614</text:p>
          </table:table-cell>
          <table:table-cell table:style-name="ce4" office:value-type="float" office:value="0.953945" calcext:value-type="float">
            <text:p>0.954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style-name="ce5" office:value-type="float" office:value="0.075911" calcext:value-type="float">
            <text:p>0.07591</text:p>
          </table:table-cell>
          <table:table-cell office:value-type="float" office:value="0.075966" calcext:value-type="float">
            <text:p>0.07597</text:p>
          </table:table-cell>
          <table:table-cell table:style-name="ce5" office:value-type="float" office:value="0.101663" calcext:value-type="float">
            <text:p>0.10166</text:p>
          </table:table-cell>
          <table:table-cell table:style-name="Default"/>
          <table:table-cell table:style-name="ce2" office:value-type="float" office:value="250" calcext:value-type="float">
            <text:p>250</text:p>
          </table:table-cell>
          <table:table-cell table:style-name="ce5" office:value-type="float" office:value="0.021482" calcext:value-type="float">
            <text:p>0.02148</text:p>
          </table:table-cell>
          <table:table-cell table:style-name="ce5" office:value-type="float" office:value="0.02339" calcext:value-type="float">
            <text:p>0.02339</text:p>
          </table:table-cell>
          <table:table-cell table:style-name="ce5" office:value-type="float" office:value="0.04393" calcext:value-type="float">
            <text:p>0.04393</text:p>
          </table:table-cell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531482" calcext:value-type="float">
            <text:p>0.531</text:p>
          </table:table-cell>
          <table:table-cell table:style-name="ce4" office:value-type="float" office:value="0.610203" calcext:value-type="float">
            <text:p>0.610</text:p>
          </table:table-cell>
          <table:table-cell table:style-name="ce4" office:value-type="float" office:value="0.953166" calcext:value-type="float">
            <text:p>0.953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style-name="ce5" office:value-type="float" office:value="0.150316" calcext:value-type="float">
            <text:p>0.15032</text:p>
          </table:table-cell>
          <table:table-cell office:value-type="float" office:value="0.151391" calcext:value-type="float">
            <text:p>0.15139</text:p>
          </table:table-cell>
          <table:table-cell table:style-name="ce5" office:value-type="float" office:value="0.201087" calcext:value-type="float">
            <text:p>0.20109</text:p>
          </table:table-cell>
          <table:table-cell table:style-name="Default"/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0.044177" calcext:value-type="float">
            <text:p>0.04418</text:p>
          </table:table-cell>
          <table:table-cell table:style-name="ce5" office:value-type="float" office:value="0.045057" calcext:value-type="float">
            <text:p>0.04506</text:p>
          </table:table-cell>
          <table:table-cell table:style-name="ce5" office:value-type="float" office:value="0.085698" calcext:value-type="float">
            <text:p>0.08570</text:p>
          </table:table-cell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0.523689" calcext:value-type="float">
            <text:p>0.524</text:p>
          </table:table-cell>
          <table:table-cell table:style-name="ce4" office:value-type="float" office:value="0.635717" calcext:value-type="float">
            <text:p>0.636</text:p>
          </table:table-cell>
          <table:table-cell table:style-name="ce4" office:value-type="float" office:value="0.956062" calcext:value-type="float">
            <text:p>0.956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table:style-name="ce5" office:value-type="float" office:value="0.293634" calcext:value-type="float">
            <text:p>0.29363</text:p>
          </table:table-cell>
          <table:table-cell office:value-type="float" office:value="0.303047" calcext:value-type="float">
            <text:p>0.30305</text:p>
          </table:table-cell>
          <table:table-cell table:style-name="ce5" office:value-type="float" office:value="0.399391" calcext:value-type="float">
            <text:p>0.39939</text:p>
          </table:table-cell>
          <table:table-cell table:style-name="Default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81662" calcext:value-type="float">
            <text:p>0.08166</text:p>
          </table:table-cell>
          <table:table-cell table:style-name="ce5" office:value-type="float" office:value="0.091996" calcext:value-type="float">
            <text:p>0.09200</text:p>
          </table:table-cell>
          <table:table-cell table:style-name="ce5" office:value-type="float" office:value="0.17097" calcext:value-type="float">
            <text:p>0.17097</text:p>
          </table:table-cell>
          <table:table-cell table:style-name="Default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4" table:number-columns-repeated="2"/>
          <table:table-cell table:style-name="ce4" office:value-type="float" office:value="0.96282" calcext:value-type="float">
            <text:p>0.963</text:p>
          </table:table-cell>
          <table:table-cell table:style-name="Default"/>
          <table:table-cell office:value-type="float" office:value="2500" calcext:value-type="float">
            <text:p>2500</text:p>
          </table:table-cell>
          <table:table-cell table:style-name="ce5"/>
          <table:table-cell/>
          <table:table-cell table:style-name="ce5" office:value-type="float" office:value="1.005225" calcext:value-type="float">
            <text:p>1.00523</text:p>
          </table:table-cell>
          <table:table-cell table:style-name="Default"/>
          <table:table-cell table:style-name="ce2" office:value-type="float" office:value="2500" calcext:value-type="float">
            <text:p>2500</text:p>
          </table:table-cell>
          <table:table-cell table:style-name="ce5" table:number-columns-repeated="2"/>
          <table:table-cell table:style-name="ce5" office:value-type="float" office:value="0.432342" calcext:value-type="float">
            <text:p>0.43234</text:p>
          </table:table-cell>
          <table:table-cell table:style-name="Default"/>
        </table:table-row>
        <table:table-row table:style-name="ro1">
          <table:table-cell office:value-type="float" office:value="2745.3" calcext:value-type="float">
            <text:p>2745.3</text:p>
          </table:table-cell>
          <table:table-cell table:style-name="ce4" office:value-type="float" office:value="0.514904" calcext:value-type="float">
            <text:p>0.515</text:p>
          </table:table-cell>
          <table:table-cell table:style-name="ce4" table:number-columns-repeated="2"/>
          <table:table-cell table:style-name="Default"/>
          <table:table-cell office:value-type="float" office:value="2745.3" calcext:value-type="float">
            <text:p>2745.3</text:p>
          </table:table-cell>
          <table:table-cell table:style-name="ce5" office:value-type="float" office:value="0.794233" calcext:value-type="float">
            <text:p>0.79423</text:p>
          </table:table-cell>
          <table:table-cell/>
          <table:table-cell table:style-name="ce5"/>
          <table:table-cell table:style-name="Default"/>
          <table:table-cell table:style-name="ce2" office:value-type="float" office:value="2745.3" calcext:value-type="float">
            <text:p>2745.3</text:p>
          </table:table-cell>
          <table:table-cell table:style-name="ce5" office:value-type="float" office:value="0.215888" calcext:value-type="float">
            <text:p>0.21589</text:p>
          </table:table-cell>
          <table:table-cell table:style-name="ce5" table:number-columns-repeated="2"/>
          <table:table-cell table:style-name="Default"/>
        </table:table-row>
        <table:table-row table:style-name="ro1">
          <table:table-cell office:value-type="float" office:value="4687.2" calcext:value-type="float">
            <text:p>4687.2</text:p>
          </table:table-cell>
          <table:table-cell table:style-name="ce4" table:number-columns-repeated="2"/>
          <table:table-cell table:style-name="ce4" office:value-type="float" office:value="0.962875" calcext:value-type="float">
            <text:p>0.963</text:p>
          </table:table-cell>
          <table:table-cell table:style-name="Default"/>
          <table:table-cell office:value-type="float" office:value="4687.2" calcext:value-type="float">
            <text:p>4687.2</text:p>
          </table:table-cell>
          <table:table-cell table:style-name="ce5"/>
          <table:table-cell/>
          <table:table-cell table:style-name="ce5" office:value-type="float" office:value="1.928529" calcext:value-type="float">
            <text:p>1.92853</text:p>
          </table:table-cell>
          <table:table-cell table:style-name="Default"/>
          <table:table-cell table:style-name="ce2" office:value-type="float" office:value="4687.2" calcext:value-type="float">
            <text:p>4687.2</text:p>
          </table:table-cell>
          <table:table-cell table:style-name="ce5" table:number-columns-repeated="2"/>
          <table:table-cell table:style-name="ce5" office:value-type="float" office:value="0.801711" calcext:value-type="float">
            <text:p>0.80171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results_all_multi_run.A13:results_all_multi_run.O1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6T00:30:51.061834607</dc:date>
    <meta:editing-duration>PT7M12S</meta:editing-duration>
    <meta:editing-cycles>1</meta:editing-cycles>
    <meta:document-statistic meta:table-count="1" meta:cell-count="375" meta:object-count="3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81cm" svg:height="7.739cm" xlink:href=".." xlink:type="simple" chart:class="chart:scatter" chart:style-name="ch1">
        <chart:title svg:x="5.085cm" svg:y="0.29cm" chart:style-name="ch2">
          <text:p>Compression Ratio vs File Size</text:p>
        </chart:title>
        <chart:legend chart:legend-position="end" svg:x="13.385cm" svg:y="3.072cm" style:legend-expansion="high" chart:style-name="ch3"/>
        <chart:plot-area chart:style-name="ch4" table:cell-range-address="results_all_multi_run.A22:results_all_multi_run.D27" chart:data-source-has-labels="both" svg:x="1.342cm" svg:y="1.223cm" svg:width="11.712cm" svg:height="5.381cm">
          <chart:coordinate-region svg:x="2.44cm" svg:y="1.423cm" svg:width="10.242cm" svg:height="4.534cm"/>
          <chart:axis chart:dimension="x" chart:name="primary-x" chart:style-name="ch5" chartooo:axis-type="auto">
            <chart:title svg:x="5.659cm" svg:y="6.758cm" chart:style-name="ch6">
              <text:p>Original file size (KB)</text:p>
            </chart:title>
            <chart:categories table:cell-range-address="results_all_multi_run.A23:results_all_multi_run.A27"/>
          </chart:axis>
          <chart:axis chart:dimension="y" chart:name="primary-y" chart:style-name="ch7">
            <chart:title svg:x="0.451cm" svg:y="5.253cm" chart:style-name="ch8">
              <text:p>Compression ratio</text:p>
            </chart:title>
            <chart:grid chart:style-name="ch9" chart:class="major"/>
          </chart:axis>
          <chart:series chart:style-name="ch10" chart:values-cell-range-address="results_all_multi_run.B23:results_all_multi_run.B27" chart:label-cell-address="results_all_multi_run.B22:results_all_multi_run.B22" chart:class="chart:scatter">
            <chart:domain table:cell-range-address="results_all_multi_run.A23:results_all_multi_run.A27"/>
            <chart:data-point chart:repeated="5"/>
          </chart:series>
          <chart:series chart:style-name="ch11" chart:values-cell-range-address="results_all_multi_run.C23:results_all_multi_run.C27" chart:label-cell-address="results_all_multi_run.C22:results_all_multi_run.C22" chart:class="chart:scatter">
            <chart:data-point chart:repeated="5"/>
          </chart:series>
          <chart:series chart:style-name="ch12" chart:values-cell-range-address="results_all_multi_run.D23:results_all_multi_run.D27" chart:label-cell-address="results_all_multi_run.D22:results_all_multi_run.D2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</text:p>
                <draw:g>
                  <svg:desc>results_all_multi_run.B22:results_all_multi_run.B22</svg:desc>
                </draw:g>
              </table:table-cell>
              <table:table-cell office:value-type="string">
                <text:p>code</text:p>
                <draw:g>
                  <svg:desc>results_all_multi_run.C22:results_all_multi_run.C22</svg:desc>
                </draw:g>
              </table:table-cell>
              <table:table-cell office:value-type="string">
                <text:p>compressed</text:p>
                <draw:g>
                  <svg:desc>results_all_multi_run.D22:results_all_multi_run.D2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s_all_multi_run.A23:results_all_multi_run.A27</svg:desc>
                </draw:g>
              </table:table-cell>
              <table:table-cell office:value-type="float" office:value="0.497773">
                <text:p>0.497773</text:p>
                <draw:g>
                  <svg:desc>results_all_multi_run.B23:results_all_multi_run.B27</svg:desc>
                </draw:g>
              </table:table-cell>
              <table:table-cell office:value-type="float" office:value="0.52459">
                <text:p>0.52459</text:p>
                <draw:g>
                  <svg:desc>results_all_multi_run.C23:results_all_multi_run.C27</svg:desc>
                </draw:g>
              </table:table-cell>
              <table:table-cell office:value-type="float" office:value="0.975156">
                <text:p>0.975156</text:p>
                <draw:g>
                  <svg:desc>results_all_multi_run.D23:results_all_multi_run.D2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7256">
                <text:p>0.507256</text:p>
              </table:table-cell>
              <table:table-cell office:value-type="float" office:value="0.539336">
                <text:p>0.539336</text:p>
              </table:table-cell>
              <table:table-cell office:value-type="float" office:value="0.962061">
                <text:p>0.96206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21984">
                <text:p>0.521984</text:p>
              </table:table-cell>
              <table:table-cell office:value-type="float" office:value="0.614332">
                <text:p>0.614332</text:p>
              </table:table-cell>
              <table:table-cell office:value-type="float" office:value="0.953945">
                <text:p>0.9539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1482">
                <text:p>0.531482</text:p>
              </table:table-cell>
              <table:table-cell office:value-type="float" office:value="0.610203">
                <text:p>0.610203</text:p>
              </table:table-cell>
              <table:table-cell office:value-type="float" office:value="0.953166">
                <text:p>0.9531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23689">
                <text:p>0.523689</text:p>
              </table:table-cell>
              <table:table-cell office:value-type="float" office:value="0.635717">
                <text:p>0.635717</text:p>
              </table:table-cell>
              <table:table-cell office:value-type="float" office:value="0.956062">
                <text:p>0.956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75cm" svg:height="8.026cm" xlink:href=".." xlink:type="simple" chart:class="chart:scatter" chart:style-name="ch1">
        <chart:title svg:x="5.258cm" svg:y="0.296cm" chart:style-name="ch2">
          <text:p>Compression Time vs File Size</text:p>
        </chart:title>
        <chart:legend chart:legend-position="end" svg:x="13.679cm" svg:y="3.216cm" style:legend-expansion="high" chart:style-name="ch3"/>
        <chart:plot-area chart:style-name="ch4" table:cell-range-address="results_all_multi_run.F22:results_all_multi_run.I27" chart:data-source-has-labels="both" svg:x="1.348cm" svg:y="1.235cm" svg:width="11.994cm" svg:height="5.65cm">
          <chart:coordinate-region svg:x="2.816cm" svg:y="1.434cm" svg:width="10.154cm" svg:height="4.804cm"/>
          <chart:axis chart:dimension="x" chart:name="primary-x" chart:style-name="ch5" chartooo:axis-type="auto">
            <chart:title svg:x="5.806cm" svg:y="7.045cm" chart:style-name="ch6">
              <text:p>Original file size (KB)</text:p>
            </chart:title>
            <chart:categories table:cell-range-address="results_all_multi_run.F23:results_all_multi_run.F27"/>
          </chart:axis>
          <chart:axis chart:dimension="y" chart:name="primary-y" chart:style-name="ch7">
            <chart:title svg:x="0.451cm" svg:y="5.625cm" chart:style-name="ch8">
              <text:p>Compression time (s)</text:p>
            </chart:title>
            <chart:grid chart:style-name="ch9" chart:class="major"/>
          </chart:axis>
          <chart:series chart:style-name="ch10" chart:values-cell-range-address="results_all_multi_run.G23:results_all_multi_run.G27" chart:label-cell-address="results_all_multi_run.G22:results_all_multi_run.G22" chart:class="chart:scatter">
            <chart:domain table:cell-range-address="results_all_multi_run.F23:results_all_multi_run.F27"/>
            <chart:data-point chart:repeated="5"/>
          </chart:series>
          <chart:series chart:style-name="ch11" chart:values-cell-range-address="results_all_multi_run.H23:results_all_multi_run.H27" chart:label-cell-address="results_all_multi_run.H22:results_all_multi_run.H22" chart:class="chart:scatter">
            <chart:data-point chart:repeated="5"/>
          </chart:series>
          <chart:series chart:style-name="ch12" chart:values-cell-range-address="results_all_multi_run.I23:results_all_multi_run.I27" chart:label-cell-address="results_all_multi_run.I22:results_all_multi_run.I2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</text:p>
                <draw:g>
                  <svg:desc>results_all_multi_run.G22:results_all_multi_run.G22</svg:desc>
                </draw:g>
              </table:table-cell>
              <table:table-cell office:value-type="string">
                <text:p>code</text:p>
                <draw:g>
                  <svg:desc>results_all_multi_run.H22:results_all_multi_run.H22</svg:desc>
                </draw:g>
              </table:table-cell>
              <table:table-cell office:value-type="string">
                <text:p>compressed</text:p>
                <draw:g>
                  <svg:desc>results_all_multi_run.I22:results_all_multi_run.I2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s_all_multi_run.F23:results_all_multi_run.F27</svg:desc>
                </draw:g>
              </table:table-cell>
              <table:table-cell office:value-type="float" office:value="0.016604">
                <text:p>0.016604</text:p>
                <draw:g>
                  <svg:desc>results_all_multi_run.G23:results_all_multi_run.G27</svg:desc>
                </draw:g>
              </table:table-cell>
              <table:table-cell office:value-type="float" office:value="0.015769">
                <text:p>0.015769</text:p>
                <draw:g>
                  <svg:desc>results_all_multi_run.H23:results_all_multi_run.H27</svg:desc>
                </draw:g>
              </table:table-cell>
              <table:table-cell office:value-type="float" office:value="0.022137">
                <text:p>0.022137</text:p>
                <draw:g>
                  <svg:desc>results_all_multi_run.I23:results_all_multi_run.I2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0718">
                <text:p>0.030718</text:p>
              </table:table-cell>
              <table:table-cell office:value-type="float" office:value="0.030491">
                <text:p>0.030491</text:p>
              </table:table-cell>
              <table:table-cell office:value-type="float" office:value="0.042021">
                <text:p>0.04202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5911">
                <text:p>0.075911</text:p>
              </table:table-cell>
              <table:table-cell office:value-type="float" office:value="0.075966">
                <text:p>0.075966</text:p>
              </table:table-cell>
              <table:table-cell office:value-type="float" office:value="0.101663">
                <text:p>0.10166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0316">
                <text:p>0.150316</text:p>
              </table:table-cell>
              <table:table-cell office:value-type="float" office:value="0.151391">
                <text:p>0.151391</text:p>
              </table:table-cell>
              <table:table-cell office:value-type="float" office:value="0.201087">
                <text:p>0.2010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93634">
                <text:p>0.293634</text:p>
              </table:table-cell>
              <table:table-cell office:value-type="float" office:value="0.303047">
                <text:p>0.303047</text:p>
              </table:table-cell>
              <table:table-cell office:value-type="float" office:value="0.399391">
                <text:p>0.399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34cm" svg:height="7.924cm" xlink:href=".." xlink:type="simple" chart:class="chart:scatter" chart:style-name="ch1">
        <chart:title svg:x="4.2cm" svg:y="0.294cm" chart:style-name="ch2">
          <text:p>Decompression Time vs File Size</text:p>
        </chart:title>
        <chart:legend chart:legend-position="end" svg:x="12.038cm" svg:y="3.165cm" style:legend-expansion="high" chart:style-name="ch3"/>
        <chart:plot-area chart:style-name="ch4" table:cell-range-address="results_all_multi_run.K22:results_all_multi_run.N27" chart:data-source-has-labels="both" svg:x="1.315cm" svg:y="1.231cm" svg:width="10.419cm" svg:height="5.554cm">
          <chart:coordinate-region svg:x="2.783cm" svg:y="1.43cm" svg:width="8.579cm" svg:height="4.708cm"/>
          <chart:axis chart:dimension="x" chart:name="primary-x" chart:style-name="ch5" chartooo:axis-type="auto">
            <chart:title svg:x="4.985cm" svg:y="6.943cm" chart:style-name="ch6">
              <text:p>Original file size (KB)</text:p>
            </chart:title>
            <chart:categories table:cell-range-address="results_all_multi_run.K23:results_all_multi_run.K27"/>
          </chart:axis>
          <chart:axis chart:dimension="y" chart:name="primary-y" chart:style-name="ch7">
            <chart:title svg:x="0.451cm" svg:y="5.732cm" chart:style-name="ch8">
              <text:p>Decompression time (s)</text:p>
            </chart:title>
            <chart:grid chart:style-name="ch9" chart:class="major"/>
          </chart:axis>
          <chart:series chart:style-name="ch10" chart:values-cell-range-address="results_all_multi_run.L23:results_all_multi_run.L27" chart:label-cell-address="results_all_multi_run.L22:results_all_multi_run.L22" chart:class="chart:scatter">
            <chart:domain table:cell-range-address="results_all_multi_run.K23:results_all_multi_run.K27"/>
            <chart:data-point chart:repeated="5"/>
          </chart:series>
          <chart:series chart:style-name="ch11" chart:values-cell-range-address="results_all_multi_run.M23:results_all_multi_run.M27" chart:label-cell-address="results_all_multi_run.M22:results_all_multi_run.M22" chart:class="chart:scatter">
            <chart:data-point chart:repeated="5"/>
          </chart:series>
          <chart:series chart:style-name="ch12" chart:values-cell-range-address="results_all_multi_run.N23:results_all_multi_run.N27" chart:label-cell-address="results_all_multi_run.N22:results_all_multi_run.N2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</text:p>
                <draw:g>
                  <svg:desc>results_all_multi_run.L22:results_all_multi_run.L22</svg:desc>
                </draw:g>
              </table:table-cell>
              <table:table-cell office:value-type="string">
                <text:p>code</text:p>
                <draw:g>
                  <svg:desc>results_all_multi_run.M22:results_all_multi_run.M22</svg:desc>
                </draw:g>
              </table:table-cell>
              <table:table-cell office:value-type="string">
                <text:p>compressed</text:p>
                <draw:g>
                  <svg:desc>results_all_multi_run.N22:results_all_multi_run.N2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s_all_multi_run.K23:results_all_multi_run.K27</svg:desc>
                </draw:g>
              </table:table-cell>
              <table:table-cell office:value-type="float" office:value="0.005236">
                <text:p>0.005236</text:p>
                <draw:g>
                  <svg:desc>results_all_multi_run.L23:results_all_multi_run.L27</svg:desc>
                </draw:g>
              </table:table-cell>
              <table:table-cell office:value-type="float" office:value="0.005213">
                <text:p>0.005213</text:p>
                <draw:g>
                  <svg:desc>results_all_multi_run.M23:results_all_multi_run.M27</svg:desc>
                </draw:g>
              </table:table-cell>
              <table:table-cell office:value-type="float" office:value="0.010366">
                <text:p>0.010366</text:p>
                <draw:g>
                  <svg:desc>results_all_multi_run.N23:results_all_multi_run.N2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9361">
                <text:p>0.009361</text:p>
              </table:table-cell>
              <table:table-cell office:value-type="float" office:value="0.009138">
                <text:p>0.009138</text:p>
              </table:table-cell>
              <table:table-cell office:value-type="float" office:value="0.018615">
                <text:p>0.0186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1482">
                <text:p>0.021482</text:p>
              </table:table-cell>
              <table:table-cell office:value-type="float" office:value="0.02339">
                <text:p>0.02339</text:p>
              </table:table-cell>
              <table:table-cell office:value-type="float" office:value="0.04393">
                <text:p>0.043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4177">
                <text:p>0.044177</text:p>
              </table:table-cell>
              <table:table-cell office:value-type="float" office:value="0.045057">
                <text:p>0.045057</text:p>
              </table:table-cell>
              <table:table-cell office:value-type="float" office:value="0.085698">
                <text:p>0.0856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1662">
                <text:p>0.081662</text:p>
              </table:table-cell>
              <table:table-cell office:value-type="float" office:value="0.091996">
                <text:p>0.091996</text:p>
              </table:table-cell>
              <table:table-cell office:value-type="float" office:value="0.17097">
                <text:p>0.17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